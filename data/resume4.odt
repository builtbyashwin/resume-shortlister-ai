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Priya Nair</text:p>
      <text:p text:style-name="Standard"/>
      <text:p text:style-name="Standard">Skills:</text:p>
      <text:p text:style-name="Standard">Python, Data Analysis, Pandas, SQL, Git</text:p>
      <text:p text:style-name="Standard"/>
      <text:p text:style-name="Standard">Experience:</text:p>
      <text:p text:style-name="Standard">Worked on data preprocessing and analysis for business reports.</text:p>
      <text:p text:style-name="Standard">Assisted in building simple predictive models.</text:p>
      <text:p text:style-name="Standard"/>
      <text:p text:style-name="Standard">Education:</text:p>
      <text:p text:style-name="Standard">M.Sc Data Scie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19:20:58.183358427</meta:creation-date>
    <dc:date>2026-05-27T19:21:05.022403015</dc:date>
    <meta:editing-duration>PT8S</meta:editing-duration>
    <meta:editing-cycles>1</meta:editing-cycles>
    <meta:document-statistic meta:table-count="0" meta:image-count="0" meta:object-count="0" meta:page-count="1" meta:paragraph-count="8" meta:word-count="30" meta:character-count="209" meta:non-whitespace-character-count="187"/>
    <meta:generator>LibreOffice/24.2.7.2$Linux_X86_64 LibreOffice_project/420$Build-2</meta:generator>
  </office:meta>
</office:document-meta>
</file>